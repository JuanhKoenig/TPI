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23000001A1FCEFB2EE.png" manifest:media-type="image/png"/>
  <manifest:file-entry manifest:full-path="Pictures/10000001000002870000011AB172AF10.png" manifest:media-type="image/png"/>
  <manifest:file-entry manifest:full-path="Pictures/100000010000021900000127C031F7D5.png" manifest:media-type="image/png"/>
  <manifest:file-entry manifest:full-path="Pictures/1000000100000156000000E4F11F41A8.png" manifest:media-type="image/png"/>
  <manifest:file-entry manifest:full-path="Pictures/10000001000002AA00000390835CF6B0.png" manifest:media-type="image/png"/>
  <manifest:file-entry manifest:full-path="Pictures/10000001000003F9000002AFE9B0FA9F.png" manifest:media-type="image/png"/>
  <manifest:file-entry manifest:full-path="Pictures/10000001000001C0000001386BDA7549.png" manifest:media-type="image/png"/>
  <manifest:file-entry manifest:full-path="Pictures/10000001000002E70000014AE980B2F0.png" manifest:media-type="image/png"/>
  <manifest:file-entry manifest:full-path="Pictures/10000001000002F30000012F0ADA4936.png" manifest:media-type="image/png"/>
  <manifest:file-entry manifest:full-path="Pictures/1000000100000340000001015461921F.png" manifest:media-type="image/png"/>
  <manifest:file-entry manifest:full-path="Pictures/100000010000030D000000E1F1F1D2C7.png" manifest:media-type="image/png"/>
  <manifest:file-entry manifest:full-path="Pictures/100000010000013C000000A7429E5EAA.png" manifest:media-type="image/png"/>
  <manifest:file-entry manifest:full-path="Pictures/10000001000001A90000029C99EDA5A4.png" manifest:media-type="image/png"/>
  <manifest:file-entry manifest:full-path="Pictures/10000001000002EE000001DC34380570.png" manifest:media-type="image/png"/>
  <manifest:file-entry manifest:full-path="Pictures/10000001000003F40000024C24838260.png" manifest:media-type="image/png"/>
  <manifest:file-entry manifest:full-path="Pictures/1000000100000416000000BA5738439C.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line-height="200%" fo:text-align="center" style:justify-single-word="false"/>
      <style:text-properties style:font-name="Times New Roman" fo:language="en" fo:country="US" officeooo:rsid="001712a2" officeooo:paragraph-rsid="001712a2"/>
    </style:style>
    <style:style style:name="P2" style:family="paragraph" style:parent-style-name="Standard">
      <style:paragraph-properties fo:line-height="200%" fo:text-align="center" style:justify-single-word="false"/>
      <style:text-properties style:font-name="Times New Roman" fo:language="es" fo:country="US" officeooo:rsid="001712a2" officeooo:paragraph-rsid="001712a2" style:script-type="latin"/>
    </style:style>
    <style:style style:name="P3" style:family="paragraph" style:parent-style-name="Standard">
      <style:paragraph-properties fo:line-height="200%" fo:text-align="center" style:justify-single-word="false"/>
      <style:text-properties style:font-name="Times New Roman" fo:language="es" fo:country="US" fo:font-weight="bold" officeooo:rsid="001712a2" officeooo:paragraph-rsid="001712a2" style:font-weight-asian="bold" style:font-weight-complex="bold" style:script-type="latin"/>
    </style:style>
    <style:style style:name="P4" style:family="paragraph" style:parent-style-name="Standard">
      <style:paragraph-properties fo:line-height="200%" fo:text-align="center" style:justify-single-word="false" fo:break-before="page"/>
      <style:text-properties style:font-name="Times New Roman" fo:language="es" fo:country="US" officeooo:rsid="00188352" officeooo:paragraph-rsid="00188352" style:script-type="latin"/>
    </style:style>
    <style:style style:name="P5" style:family="paragraph" style:parent-style-name="Standard">
      <style:paragraph-properties fo:line-height="200%" fo:text-align="center" style:justify-single-word="false"/>
      <style:text-properties style:font-name="Times New Roman" fo:language="es" fo:country="US" officeooo:rsid="003e59ae" officeooo:paragraph-rsid="003e59ae" style:script-type="latin"/>
    </style:style>
    <style:style style:name="P6" style:family="paragraph" style:parent-style-name="Standard">
      <style:paragraph-properties fo:line-height="200%" fo:text-align="center" style:justify-single-word="false"/>
      <style:text-properties style:font-name="Times New Roman" fo:language="es" fo:country="US" officeooo:rsid="004008f6" officeooo:paragraph-rsid="004008f6" style:script-type="latin"/>
    </style:style>
    <style:style style:name="P7" style:family="paragraph" style:parent-style-name="Standard">
      <style:paragraph-properties fo:line-height="200%" fo:text-align="center" style:justify-single-word="false" fo:break-before="page"/>
      <style:text-properties style:font-name="Times New Roman" fo:language="es" fo:country="US" style:text-underline-style="solid" style:text-underline-width="auto" style:text-underline-color="font-color" fo:font-weight="bold" officeooo:rsid="00188352" officeooo:paragraph-rsid="00188352" style:font-weight-asian="bold" style:font-weight-complex="bold" style:script-type="latin"/>
    </style:style>
    <style:style style:name="P8" style:family="paragraph" style:parent-style-name="Standard">
      <style:paragraph-properties fo:line-height="200%" fo:text-align="justify" style:justify-single-word="false"/>
      <style:text-properties style:font-name="Times New Roman" fo:language="es" fo:country="US" style:text-underline-style="none" fo:font-weight="normal" officeooo:rsid="00188352" officeooo:paragraph-rsid="00188352" style:font-weight-asian="normal" style:font-weight-complex="normal" style:script-type="latin"/>
    </style:style>
    <style:style style:name="P9" style:family="paragraph" style:parent-style-name="Standard">
      <style:paragraph-properties fo:line-height="200%" fo:text-align="center" style:justify-single-word="false" fo:break-before="page"/>
      <style:text-properties style:font-name="Times New Roman" fo:language="es" fo:country="US" style:text-underline-style="solid" style:text-underline-width="auto" style:text-underline-color="font-color" fo:font-weight="bold" officeooo:rsid="001a7597" officeooo:paragraph-rsid="001a7597" style:font-weight-asian="bold" style:font-weight-complex="bold" style:script-type="latin"/>
    </style:style>
    <style:style style:name="P10" style:family="paragraph" style:parent-style-name="Standard">
      <style:paragraph-properties fo:line-height="200%" fo:text-align="justify" style:justify-single-word="false"/>
      <style:text-properties style:font-name="Times New Roman" fo:language="es" fo:country="US" style:text-underline-style="none" fo:font-weight="normal" officeooo:rsid="001a7597" officeooo:paragraph-rsid="001a7597" style:font-weight-asian="normal" style:font-weight-complex="normal" style:script-type="latin"/>
    </style:style>
    <style:style style:name="P11" style:family="paragraph" style:parent-style-name="Standard" style:list-style-name="L1">
      <style:paragraph-properties fo:line-height="200%" fo:text-align="justify" style:justify-single-word="false"/>
      <style:text-properties style:font-name="Times New Roman" fo:language="es" fo:country="US" style:text-underline-style="none" fo:font-weight="normal" officeooo:rsid="001a7597" officeooo:paragraph-rsid="001a7597" style:font-weight-asian="normal" style:font-weight-complex="normal" style:script-type="latin"/>
    </style:style>
    <style:style style:name="P12" style:family="paragraph" style:parent-style-name="Standard">
      <style:paragraph-properties fo:line-height="200%" fo:text-align="center" style:justify-single-word="false" fo:break-before="page"/>
      <style:text-properties style:font-name="Times New Roman" fo:language="es" fo:country="US" style:text-underline-style="solid" style:text-underline-width="auto" style:text-underline-color="font-color" fo:font-weight="bold" officeooo:rsid="001b299b" officeooo:paragraph-rsid="001b299b" style:font-weight-asian="bold" style:font-weight-complex="bold" style:script-type="latin"/>
    </style:style>
    <style:style style:name="P13" style:family="paragraph" style:parent-style-name="Standard">
      <style:paragraph-properties fo:line-height="200%" fo:text-align="justify" style:justify-single-word="false"/>
      <style:text-properties style:font-name="Times New Roman" fo:language="es" fo:country="US" style:text-underline-style="none" fo:font-weight="normal" officeooo:rsid="001b299b" officeooo:paragraph-rsid="001b299b" style:font-weight-asian="normal" style:font-weight-complex="normal" style:script-type="latin"/>
    </style:style>
    <style:style style:name="P14" style:family="paragraph" style:parent-style-name="Standard" style:list-style-name="L2">
      <style:paragraph-properties fo:line-height="200%" fo:text-align="justify" style:justify-single-word="false"/>
      <style:text-properties style:font-name="Times New Roman" fo:language="es" fo:country="US" style:text-underline-style="none" fo:font-weight="normal" officeooo:rsid="001b299b" officeooo:paragraph-rsid="001b299b" style:font-weight-asian="normal" style:font-weight-complex="normal" style:script-type="latin"/>
    </style:style>
    <style:style style:name="P15" style:family="paragraph" style:parent-style-name="Standard">
      <style:paragraph-properties fo:line-height="200%" fo:text-align="justify" style:justify-single-word="false"/>
      <style:text-properties style:font-name="Times New Roman" fo:language="es" fo:country="US" style:text-underline-style="none" fo:font-weight="normal" officeooo:rsid="001f247c" officeooo:paragraph-rsid="001f247c" style:font-weight-asian="normal" style:font-weight-complex="normal" style:script-type="latin"/>
    </style:style>
    <style:style style:name="P16" style:family="paragraph" style:parent-style-name="Standard">
      <style:paragraph-properties fo:line-height="200%" fo:text-align="justify" style:justify-single-word="false" fo:break-before="page"/>
      <style:text-properties style:font-name="Times New Roman" fo:language="es" fo:country="US" style:text-underline-style="none" fo:font-weight="bold" officeooo:rsid="001bc10e" officeooo:paragraph-rsid="001bc10e" style:font-weight-asian="bold" style:font-weight-complex="bold" style:script-type="latin"/>
    </style:style>
    <style:style style:name="P17" style:family="paragraph" style:parent-style-name="Standard">
      <style:paragraph-properties fo:line-height="200%" fo:text-align="justify" style:justify-single-word="false"/>
      <style:text-properties style:font-name="Times New Roman" fo:language="es" fo:country="US" style:text-underline-style="none" fo:font-weight="normal" officeooo:rsid="001bc10e" officeooo:paragraph-rsid="001bc10e" style:font-weight-asian="normal" style:font-weight-complex="normal" style:script-type="latin"/>
    </style:style>
    <style:style style:name="P18" style:family="paragraph" style:parent-style-name="Standard">
      <style:paragraph-properties fo:line-height="200%" fo:text-align="justify" style:justify-single-word="false" style:writing-mode="lr-tb" style:writing-mode-automatic="false"/>
      <style:text-properties style:font-name="Times New Roman" fo:language="es" fo:country="US" style:text-underline-style="none" fo:font-weight="normal" officeooo:rsid="001bc10e" officeooo:paragraph-rsid="001bc10e" style:font-weight-asian="normal" style:font-weight-complex="normal" style:script-type="latin"/>
    </style:style>
    <style:style style:name="P19" style:family="paragraph" style:parent-style-name="Standard">
      <style:paragraph-properties fo:line-height="200%" fo:text-align="justify" style:justify-single-word="false" fo:text-indent="1.27cm" style:auto-text-indent="false" style:writing-mode="lr-tb" style:writing-mode-automatic="false"/>
      <style:text-properties style:font-name="Times New Roman" fo:language="es" fo:country="US" style:text-underline-style="none" fo:font-weight="normal" officeooo:rsid="001bc10e" officeooo:paragraph-rsid="001bc10e" style:font-weight-asian="normal" style:font-weight-complex="normal" style:script-type="latin"/>
    </style:style>
    <style:style style:name="P20" style:family="paragraph" style:parent-style-name="Standard">
      <style:paragraph-properties fo:line-height="200%" fo:text-align="justify" style:justify-single-word="false" fo:text-indent="1.27cm" style:auto-text-indent="false" style:writing-mode="lr-tb" style:writing-mode-automatic="false"/>
      <style:text-properties style:font-name="Times New Roman" fo:language="es" fo:country="US" style:text-underline-style="none" fo:font-weight="normal" officeooo:rsid="001e5f62" officeooo:paragraph-rsid="001e5f62" style:font-weight-asian="normal" style:font-weight-complex="normal" style:script-type="latin"/>
    </style:style>
    <style:style style:name="P21" style:family="paragraph" style:parent-style-name="Standard">
      <style:paragraph-properties fo:line-height="200%" fo:text-align="justify" style:justify-single-word="false" fo:text-indent="1.27cm" style:auto-text-indent="false" fo:break-before="page" style:writing-mode="lr-tb" style:writing-mode-automatic="false"/>
      <style:text-properties style:font-name="Times New Roman" fo:language="es" fo:country="US" style:text-underline-style="none" fo:font-weight="normal" officeooo:rsid="001e5f62" officeooo:paragraph-rsid="001e5f62" style:font-weight-asian="normal" style:font-weight-complex="normal" style:script-type="latin"/>
    </style:style>
    <style:style style:name="P22" style:family="paragraph" style:parent-style-name="Standard">
      <style:paragraph-properties fo:line-height="200%" fo:text-align="justify" style:justify-single-word="false" style:writing-mode="lr-tb" style:writing-mode-automatic="false"/>
      <style:text-properties style:font-name="Times New Roman" fo:language="es" fo:country="US" style:text-underline-style="none" fo:font-weight="normal" officeooo:rsid="001e5f62" officeooo:paragraph-rsid="001e5f62" style:font-weight-asian="normal" style:font-weight-complex="normal" style:script-type="latin"/>
    </style:style>
    <style:style style:name="P23" style:family="paragraph" style:parent-style-name="Standard">
      <style:paragraph-properties fo:line-height="200%" fo:text-align="justify" style:justify-single-word="false" style:writing-mode="lr-tb" style:writing-mode-automatic="false"/>
      <style:text-properties style:font-name="Times New Roman" fo:language="es" fo:country="US" style:text-underline-style="none" fo:font-weight="normal" officeooo:rsid="00211421" officeooo:paragraph-rsid="00211421" style:font-weight-asian="normal" style:font-weight-complex="normal" style:script-type="latin"/>
    </style:style>
    <style:style style:name="P24" style:family="paragraph" style:parent-style-name="Standard">
      <style:paragraph-properties fo:line-height="200%" fo:text-align="justify" style:justify-single-word="false" fo:text-indent="1.27cm" style:auto-text-indent="false" style:writing-mode="lr-tb" style:writing-mode-automatic="false"/>
      <style:text-properties style:font-name="Times New Roman" fo:language="es" fo:country="US" style:text-underline-style="none" fo:font-weight="normal" officeooo:rsid="00211421" officeooo:paragraph-rsid="00211421" style:font-weight-asian="normal" style:font-weight-complex="normal" style:script-type="latin"/>
    </style:style>
    <style:style style:name="P25" style:family="paragraph" style:parent-style-name="Standard">
      <style:paragraph-properties fo:line-height="200%" fo:text-align="justify" style:justify-single-word="false" style:writing-mode="lr-tb" style:writing-mode-automatic="false"/>
      <style:text-properties style:font-name="Times New Roman" fo:language="es" fo:country="US" style:text-underline-style="none" fo:font-weight="normal" officeooo:rsid="0021471a" officeooo:paragraph-rsid="0021471a" style:font-weight-asian="normal" style:font-weight-complex="normal" style:script-type="latin"/>
    </style:style>
    <style:style style:name="P26" style:family="paragraph" style:parent-style-name="Standard">
      <style:paragraph-properties fo:line-height="200%" fo:text-align="justify" style:justify-single-word="false" style:writing-mode="lr-tb" style:writing-mode-automatic="false"/>
      <style:text-properties style:font-name="Times New Roman" fo:font-weight="normal" officeooo:paragraph-rsid="00225847"/>
    </style:style>
    <style:style style:name="P27" style:family="paragraph" style:parent-style-name="Standard">
      <style:paragraph-properties fo:line-height="200%" fo:text-align="justify" style:justify-single-word="false" style:writing-mode="lr-tb" style:writing-mode-automatic="false"/>
      <style:text-properties style:font-name="Times New Roman" fo:language="es" fo:country="US" style:text-underline-style="none" fo:font-weight="normal" officeooo:rsid="00211421" officeooo:paragraph-rsid="00225847" style:font-weight-asian="normal" style:font-weight-complex="normal" style:script-type="latin"/>
    </style:style>
    <style:style style:name="P28" style:family="paragraph" style:parent-style-name="Standard">
      <style:paragraph-properties fo:line-height="200%" fo:text-align="justify" style:justify-single-word="false" style:writing-mode="lr-tb" style:writing-mode-automatic="false"/>
      <style:text-properties style:font-name="Times New Roman" fo:language="es" fo:country="US" style:text-underline-style="none" fo:font-weight="bold" officeooo:rsid="00236e00" officeooo:paragraph-rsid="00236e00" style:font-weight-asian="bold" style:font-weight-complex="bold" style:script-type="latin"/>
    </style:style>
    <style:style style:name="P29" style:family="paragraph" style:parent-style-name="Standard">
      <style:paragraph-properties fo:line-height="200%" fo:text-align="justify" style:justify-single-word="false" style:writing-mode="lr-tb" style:writing-mode-automatic="false"/>
      <style:text-properties style:font-name="Times New Roman" fo:language="es" fo:country="US" style:text-underline-style="none" fo:font-weight="normal" officeooo:rsid="00236e00" officeooo:paragraph-rsid="00236e00" style:font-weight-asian="normal" style:font-weight-complex="normal" style:script-type="latin"/>
    </style:style>
    <style:style style:name="P30" style:family="paragraph" style:parent-style-name="Standard">
      <style:paragraph-properties fo:line-height="200%" fo:text-align="justify" style:justify-single-word="false" style:writing-mode="lr-tb" style:writing-mode-automatic="false"/>
      <style:text-properties style:font-name="Times New Roman" fo:language="es" fo:country="US" style:text-underline-style="none" fo:font-weight="bold" officeooo:rsid="002487b6" officeooo:paragraph-rsid="002487b6" style:font-weight-asian="bold" style:font-weight-complex="bold" style:script-type="latin"/>
    </style:style>
    <style:style style:name="P31" style:family="paragraph" style:parent-style-name="Standard">
      <style:paragraph-properties fo:line-height="200%" fo:text-align="justify" style:justify-single-word="false" style:writing-mode="lr-tb" style:writing-mode-automatic="false"/>
      <style:text-properties style:font-name="Times New Roman" fo:language="es" fo:country="US" style:text-underline-style="none" fo:font-weight="normal" officeooo:rsid="002487b6" officeooo:paragraph-rsid="002487b6" style:font-weight-asian="normal" style:font-weight-complex="normal" style:script-type="latin"/>
    </style:style>
    <style:style style:name="P32" style:family="paragraph" style:parent-style-name="Standard">
      <style:paragraph-properties fo:line-height="200%" fo:text-align="justify" style:justify-single-word="false" style:writing-mode="lr-tb" style:writing-mode-automatic="false"/>
      <style:text-properties style:font-name="Times New Roman" fo:language="es" fo:country="US" style:text-underline-style="none" fo:font-weight="normal" officeooo:rsid="00261a2c" officeooo:paragraph-rsid="00261a2c" style:font-weight-asian="normal" style:font-weight-complex="normal" style:script-type="latin"/>
    </style:style>
    <style:style style:name="P33" style:family="paragraph" style:parent-style-name="Standard">
      <style:paragraph-properties fo:line-height="200%" fo:text-align="justify" style:justify-single-word="false" style:writing-mode="lr-tb" style:writing-mode-automatic="false"/>
      <style:text-properties style:font-name="Times New Roman" fo:language="es" fo:country="US" style:text-underline-style="none" fo:font-weight="normal" officeooo:rsid="002487b6" officeooo:paragraph-rsid="0024fc3e" style:font-weight-asian="normal" style:font-weight-complex="normal" style:script-type="latin"/>
    </style:style>
    <style:style style:name="P34" style:family="paragraph" style:parent-style-name="Standard">
      <style:paragraph-properties fo:line-height="200%" fo:text-align="justify" style:justify-single-word="false" style:writing-mode="lr-tb" style:writing-mode-automatic="false"/>
      <style:text-properties style:font-name="Times New Roman" fo:language="es" fo:country="US" style:text-underline-style="none" fo:font-weight="normal" officeooo:rsid="00280ff9" officeooo:paragraph-rsid="00280ff9" style:font-weight-asian="normal" style:font-weight-complex="normal" style:script-type="latin"/>
    </style:style>
    <style:style style:name="P35" style:family="paragraph" style:parent-style-name="Standard">
      <style:paragraph-properties fo:line-height="200%" fo:text-align="justify" style:justify-single-word="false" style:writing-mode="lr-tb" style:writing-mode-automatic="false"/>
      <style:text-properties style:font-name="Times New Roman" fo:language="es" fo:country="US" style:text-underline-style="none" fo:font-weight="normal" officeooo:rsid="003e59ae" officeooo:paragraph-rsid="003e59ae" style:font-weight-asian="normal" style:font-weight-complex="normal" style:script-type="latin"/>
    </style:style>
    <style:style style:name="P36" style:family="paragraph" style:parent-style-name="Standard">
      <style:paragraph-properties fo:line-height="200%" fo:text-align="justify" style:justify-single-word="false" style:writing-mode="lr-tb" style:writing-mode-automatic="false"/>
      <style:text-properties style:font-name="Times New Roman" fo:language="es" fo:country="US" style:text-underline-style="none" fo:font-weight="bold" officeooo:rsid="00282558" officeooo:paragraph-rsid="00282558" style:font-weight-asian="bold" style:font-weight-complex="bold" style:script-type="latin"/>
    </style:style>
    <style:style style:name="P37" style:family="paragraph" style:parent-style-name="Standard">
      <style:paragraph-properties fo:line-height="200%" fo:text-align="justify" style:justify-single-word="false" style:writing-mode="lr-tb" style:writing-mode-automatic="false"/>
      <style:text-properties style:font-name="Times New Roman" fo:language="es" fo:country="US" style:text-underline-style="none" fo:font-weight="normal" officeooo:rsid="002a0c78" officeooo:paragraph-rsid="002a0c78" style:font-weight-asian="normal" style:font-weight-complex="normal" style:script-type="latin"/>
    </style:style>
    <style:style style:name="P38" style:family="paragraph" style:parent-style-name="Standard">
      <style:paragraph-properties fo:line-height="200%" fo:text-align="justify" style:justify-single-word="false" style:writing-mode="lr-tb" style:writing-mode-automatic="false"/>
      <style:text-properties style:font-name="Times New Roman" fo:language="es" fo:country="US" style:text-underline-style="none" fo:font-weight="normal" officeooo:rsid="002d2f12" officeooo:paragraph-rsid="002d2f12" style:font-weight-asian="normal" style:font-weight-complex="normal" style:script-type="latin"/>
    </style:style>
    <style:style style:name="P39" style:family="paragraph" style:parent-style-name="Standard">
      <style:paragraph-properties fo:line-height="200%" fo:text-align="justify" style:justify-single-word="false" style:writing-mode="lr-tb" style:writing-mode-automatic="false"/>
      <style:text-properties style:font-name="Times New Roman" fo:language="es" fo:country="US" style:text-underline-style="none" fo:font-weight="normal" officeooo:rsid="002e350e" officeooo:paragraph-rsid="002e350e" style:font-weight-asian="normal" style:font-weight-complex="normal" style:script-type="latin"/>
    </style:style>
    <style:style style:name="P40" style:family="paragraph" style:parent-style-name="Standard">
      <style:paragraph-properties fo:line-height="200%" fo:text-align="justify" style:justify-single-word="false" style:writing-mode="lr-tb" style:writing-mode-automatic="false"/>
      <style:text-properties style:font-name="Times New Roman" fo:language="es" fo:country="US" style:text-underline-style="none" fo:font-weight="normal" officeooo:rsid="002ef886" officeooo:paragraph-rsid="002ef886" style:font-weight-asian="normal" style:font-weight-complex="normal" style:script-type="latin"/>
    </style:style>
    <style:style style:name="P41" style:family="paragraph" style:parent-style-name="Standard">
      <style:paragraph-properties fo:line-height="200%" fo:text-align="justify" style:justify-single-word="false" fo:break-before="page" style:writing-mode="lr-tb" style:writing-mode-automatic="false"/>
      <style:text-properties style:font-name="Times New Roman" fo:language="en" fo:country="US" style:text-underline-style="none" fo:font-weight="normal" officeooo:rsid="002ef886" officeooo:paragraph-rsid="002ef886" style:font-weight-asian="normal" style:font-weight-complex="normal" style:script-type="latin"/>
    </style:style>
    <style:style style:name="P42" style:family="paragraph" style:parent-style-name="Standard">
      <style:paragraph-properties fo:line-height="200%" fo:text-align="justify" style:justify-single-word="false" style:writing-mode="lr-tb" style:writing-mode-automatic="false"/>
      <style:text-properties style:font-name="Times New Roman" fo:language="en" fo:country="US" style:text-underline-style="none" fo:font-weight="normal" officeooo:rsid="002ef886" officeooo:paragraph-rsid="002ef886" style:font-weight-asian="normal" style:font-weight-complex="normal" style:script-type="latin"/>
    </style:style>
    <style:style style:name="P43" style:family="paragraph" style:parent-style-name="Standard">
      <style:paragraph-properties fo:line-height="200%" fo:text-align="justify" style:justify-single-word="false" fo:break-before="page" style:writing-mode="lr-tb" style:writing-mode-automatic="false"/>
      <style:text-properties style:font-name="Times New Roman" fo:language="es" fo:country="US" style:text-underline-style="none" fo:font-weight="normal" officeooo:rsid="002ef886" officeooo:paragraph-rsid="002ef886" style:font-weight-asian="normal" style:font-weight-complex="normal" style:script-type="latin"/>
    </style:style>
    <style:style style:name="P44" style:family="paragraph" style:parent-style-name="Standard">
      <style:paragraph-properties fo:line-height="200%" fo:text-align="justify" style:justify-single-word="false" fo:break-before="page" style:writing-mode="lr-tb" style:writing-mode-automatic="false"/>
      <style:text-properties style:font-name="Times New Roman" fo:language="en" fo:country="US" style:text-underline-style="none" fo:font-weight="bold" officeooo:rsid="002f77be" officeooo:paragraph-rsid="002f77be" style:font-weight-asian="bold" style:font-weight-complex="bold" style:script-type="latin"/>
    </style:style>
    <style:style style:name="P45" style:family="paragraph" style:parent-style-name="Standard">
      <style:paragraph-properties fo:line-height="200%" fo:text-align="justify" style:justify-single-word="false" style:writing-mode="lr-tb" style:writing-mode-automatic="false"/>
      <style:text-properties style:font-name="Times New Roman" fo:language="es" fo:country="US" style:text-underline-style="none" fo:font-weight="normal" officeooo:rsid="002f77be" officeooo:paragraph-rsid="002f77be" style:font-weight-asian="normal" style:font-weight-complex="normal" style:script-type="latin"/>
    </style:style>
    <style:style style:name="P46" style:family="paragraph" style:parent-style-name="Standard">
      <style:paragraph-properties fo:line-height="200%" fo:text-align="justify" style:justify-single-word="false" style:writing-mode="lr-tb" style:writing-mode-automatic="false"/>
      <style:text-properties style:font-name="Times New Roman" fo:language="es" fo:country="US" style:text-underline-style="none" fo:font-weight="bold" officeooo:rsid="0033ab4d" officeooo:paragraph-rsid="0033ab4d" style:font-weight-asian="bold" style:font-weight-complex="bold" style:script-type="latin"/>
    </style:style>
    <style:style style:name="P47" style:family="paragraph" style:parent-style-name="Standard">
      <style:paragraph-properties fo:line-height="200%" fo:text-align="justify" style:justify-single-word="false" style:writing-mode="lr-tb" style:writing-mode-automatic="false"/>
      <style:text-properties style:font-name="Times New Roman" fo:language="es" fo:country="US" style:text-underline-style="none" fo:font-weight="normal" officeooo:rsid="0033ab4d" officeooo:paragraph-rsid="0033ab4d" style:font-weight-asian="normal" style:font-weight-complex="normal" style:script-type="latin"/>
    </style:style>
    <style:style style:name="P48" style:family="paragraph" style:parent-style-name="Standard">
      <style:paragraph-properties fo:line-height="200%" fo:text-align="justify" style:justify-single-word="false" fo:break-before="page" style:writing-mode="lr-tb" style:writing-mode-automatic="false"/>
      <style:text-properties style:font-name="Times New Roman" fo:language="es" fo:country="US" style:text-underline-style="none" fo:font-weight="normal" officeooo:rsid="0033ab4d" officeooo:paragraph-rsid="0033ab4d" style:font-weight-asian="normal" style:font-weight-complex="normal" style:script-type="latin"/>
    </style:style>
    <style:style style:name="P49" style:family="paragraph" style:parent-style-name="Standard">
      <style:paragraph-properties fo:line-height="200%" fo:text-align="justify" style:justify-single-word="false" style:writing-mode="lr-tb" style:writing-mode-automatic="false"/>
      <style:text-properties style:font-name="Times New Roman" fo:language="es" fo:country="US" style:text-underline-style="none" fo:font-weight="bold" officeooo:rsid="0033b05c" officeooo:paragraph-rsid="0033b05c" style:font-weight-asian="bold" style:font-weight-complex="bold" style:script-type="latin"/>
    </style:style>
    <style:style style:name="P50" style:family="paragraph" style:parent-style-name="Standard">
      <style:paragraph-properties fo:line-height="200%" fo:text-align="justify" style:justify-single-word="false" style:writing-mode="lr-tb" style:writing-mode-automatic="false"/>
      <style:text-properties style:font-name="Times New Roman" fo:language="es" fo:country="US" style:text-underline-style="none" fo:font-weight="normal" officeooo:rsid="00361799" officeooo:paragraph-rsid="0033b05c" style:font-weight-asian="normal" style:font-weight-complex="normal" style:script-type="latin"/>
    </style:style>
    <style:style style:name="P51" style:family="paragraph" style:parent-style-name="Standard">
      <style:paragraph-properties fo:line-height="200%" fo:text-align="justify" style:justify-single-word="false" style:writing-mode="lr-tb" style:writing-mode-automatic="false"/>
      <style:text-properties style:font-name="Times New Roman" fo:language="es" fo:country="US" style:text-underline-style="none" fo:font-weight="bold" officeooo:rsid="00361799" officeooo:paragraph-rsid="00361799" style:font-weight-asian="bold" style:font-weight-complex="bold" style:script-type="latin"/>
    </style:style>
    <style:style style:name="P52" style:family="paragraph" style:parent-style-name="Standard">
      <style:paragraph-properties fo:line-height="200%" fo:text-align="justify" style:justify-single-word="false" style:writing-mode="lr-tb" style:writing-mode-automatic="false"/>
      <style:text-properties style:font-name="Times New Roman" fo:language="es" fo:country="US" style:text-underline-style="none" fo:font-weight="normal" officeooo:rsid="00361799" officeooo:paragraph-rsid="00361799" style:font-weight-asian="normal" style:font-weight-complex="normal" style:script-type="latin"/>
    </style:style>
    <style:style style:name="P53" style:family="paragraph" style:parent-style-name="Standard">
      <style:paragraph-properties fo:line-height="200%" fo:text-align="justify" style:justify-single-word="false" style:writing-mode="lr-tb" style:writing-mode-automatic="false"/>
      <style:text-properties style:font-name="Times New Roman" fo:language="es" fo:country="US" style:text-underline-style="none" fo:font-weight="normal" officeooo:rsid="00368fd8" officeooo:paragraph-rsid="00368fd8" style:font-weight-asian="normal" style:font-weight-complex="normal" style:script-type="latin"/>
    </style:style>
    <style:style style:name="P54" style:family="paragraph" style:parent-style-name="Standard">
      <style:paragraph-properties fo:line-height="200%" fo:text-align="justify" style:justify-single-word="false" style:writing-mode="lr-tb" style:writing-mode-automatic="false"/>
      <style:text-properties style:font-name="Times New Roman" fo:language="es" fo:country="US" style:text-underline-style="none" fo:font-weight="normal" officeooo:rsid="00385509" officeooo:paragraph-rsid="00385509" style:font-weight-asian="normal" style:font-weight-complex="normal" style:script-type="latin"/>
    </style:style>
    <style:style style:name="P55" style:family="paragraph" style:parent-style-name="Standard">
      <style:paragraph-properties fo:line-height="200%" fo:text-align="justify" style:justify-single-word="false" fo:break-before="page" style:writing-mode="lr-tb" style:writing-mode-automatic="false"/>
      <style:text-properties style:font-name="Times New Roman" fo:language="es" fo:country="US" style:text-underline-style="none" fo:font-weight="normal" officeooo:rsid="00399edd" officeooo:paragraph-rsid="00399edd" style:font-weight-asian="normal" style:font-weight-complex="normal" style:script-type="latin"/>
    </style:style>
    <style:style style:name="P56" style:family="paragraph" style:parent-style-name="Standard">
      <style:paragraph-properties fo:line-height="200%" fo:text-align="justify" style:justify-single-word="false" style:writing-mode="lr-tb" style:writing-mode-automatic="false"/>
      <style:text-properties style:font-name="Times New Roman" fo:language="es" fo:country="US" style:text-underline-style="none" fo:font-weight="normal" officeooo:rsid="00399edd" officeooo:paragraph-rsid="00399edd" style:font-weight-asian="normal" style:font-weight-complex="normal" style:script-type="latin"/>
    </style:style>
    <style:style style:name="P57" style:family="paragraph" style:parent-style-name="Standard">
      <style:paragraph-properties fo:line-height="200%" fo:text-align="justify" style:justify-single-word="false" style:writing-mode="lr-tb" style:writing-mode-automatic="false"/>
      <style:text-properties style:font-name="Times New Roman" fo:language="es" fo:country="US" style:text-underline-style="none" fo:font-weight="bold" officeooo:rsid="00399edd" officeooo:paragraph-rsid="00399edd" style:font-weight-asian="bold" style:font-weight-complex="bold" style:script-type="latin"/>
    </style:style>
    <style:style style:name="P58" style:family="paragraph" style:parent-style-name="Standard">
      <style:paragraph-properties fo:line-height="200%" fo:text-align="justify" style:justify-single-word="false" style:writing-mode="lr-tb" style:writing-mode-automatic="false"/>
      <style:text-properties style:font-name="Times New Roman" fo:language="es" fo:country="US" style:text-underline-style="none" fo:font-weight="normal" officeooo:rsid="0039ee45" officeooo:paragraph-rsid="0039ee45" style:font-weight-asian="normal" style:font-weight-complex="normal" style:script-type="latin"/>
    </style:style>
    <style:style style:name="P59" style:family="paragraph" style:parent-style-name="Standard">
      <style:paragraph-properties fo:line-height="200%" fo:text-align="justify" style:justify-single-word="false" style:writing-mode="lr-tb" style:writing-mode-automatic="false"/>
      <style:text-properties style:font-name="Times New Roman" fo:language="es" fo:country="US" style:text-underline-style="none" fo:font-weight="bold" officeooo:rsid="0039ee45" officeooo:paragraph-rsid="0039ee45" style:font-weight-asian="bold" style:font-weight-complex="bold" style:script-type="latin"/>
    </style:style>
    <style:style style:name="P60" style:family="paragraph" style:parent-style-name="Standard">
      <style:paragraph-properties fo:line-height="200%" fo:text-align="justify" style:justify-single-word="false" style:writing-mode="lr-tb" style:writing-mode-automatic="false"/>
      <style:text-properties style:font-name="Times New Roman" fo:language="es" fo:country="US" style:text-underline-style="none" fo:font-weight="bold" officeooo:rsid="003a04c8" officeooo:paragraph-rsid="003a04c8" style:font-weight-asian="bold" style:font-weight-complex="bold" style:script-type="latin"/>
    </style:style>
    <style:style style:name="P61" style:family="paragraph" style:parent-style-name="Standard">
      <style:paragraph-properties fo:line-height="200%" fo:text-align="justify" style:justify-single-word="false" style:writing-mode="lr-tb" style:writing-mode-automatic="false"/>
      <style:text-properties style:font-name="Times New Roman" fo:language="es" fo:country="US" style:text-underline-style="none" fo:font-weight="normal" officeooo:rsid="003aac73" officeooo:paragraph-rsid="003aac73" style:font-weight-asian="normal" style:font-weight-complex="normal" style:script-type="latin"/>
    </style:style>
    <style:style style:name="P62" style:family="paragraph" style:parent-style-name="Standard">
      <style:paragraph-properties fo:line-height="200%" fo:text-align="justify" style:justify-single-word="false" style:writing-mode="lr-tb" style:writing-mode-automatic="false"/>
      <style:text-properties style:font-name="Times New Roman" fo:language="es" fo:country="US" style:text-underline-style="none" fo:font-weight="normal" officeooo:rsid="003a04c8" officeooo:paragraph-rsid="003a04c8" style:font-weight-asian="normal" style:font-weight-complex="normal" style:script-type="latin"/>
    </style:style>
    <style:style style:name="P63" style:family="paragraph" style:parent-style-name="Standard">
      <style:paragraph-properties fo:line-height="200%" fo:text-align="justify" style:justify-single-word="false" fo:break-before="page" style:writing-mode="lr-tb" style:writing-mode-automatic="false"/>
      <style:text-properties style:font-name="Times New Roman" fo:language="es" fo:country="US" style:text-underline-style="none" fo:font-weight="bold" officeooo:rsid="003aac73" officeooo:paragraph-rsid="003aac73" style:font-weight-asian="bold" style:font-weight-complex="bold" style:script-type="latin"/>
    </style:style>
    <style:style style:name="P64" style:family="paragraph" style:parent-style-name="Standard">
      <style:paragraph-properties fo:line-height="200%" fo:text-align="justify" style:justify-single-word="false" style:writing-mode="lr-tb" style:writing-mode-automatic="false"/>
      <style:text-properties style:font-name="Times New Roman" fo:language="es" fo:country="US" style:text-underline-style="none" fo:font-weight="normal" officeooo:rsid="003c3e94" officeooo:paragraph-rsid="003c3e94" style:font-weight-asian="normal" style:font-weight-complex="normal" style:script-type="latin"/>
    </style:style>
    <style:style style:name="P65" style:family="paragraph" style:parent-style-name="Standard">
      <style:paragraph-properties fo:line-height="200%" fo:text-align="justify" style:justify-single-word="false" fo:break-before="page" style:writing-mode="lr-tb" style:writing-mode-automatic="false"/>
      <style:text-properties style:font-name="Times New Roman" fo:language="es" fo:country="US" style:text-underline-style="none" fo:font-weight="bold" officeooo:rsid="003c3e94" officeooo:paragraph-rsid="003c3e94" style:font-weight-asian="bold" style:font-weight-complex="bold" style:script-type="latin"/>
    </style:style>
    <style:style style:name="P66" style:family="paragraph" style:parent-style-name="Standard">
      <style:paragraph-properties fo:line-height="200%" fo:text-align="justify" style:justify-single-word="false" style:writing-mode="lr-tb" style:writing-mode-automatic="false"/>
      <style:text-properties style:font-name="Times New Roman" fo:language="es" fo:country="US" style:text-underline-style="none" fo:font-weight="normal" officeooo:rsid="003d68a4" officeooo:paragraph-rsid="003d68a4" style:font-weight-asian="normal" style:font-weight-complex="normal" style:script-type="latin"/>
    </style:style>
    <style:style style:name="P67" style:family="paragraph" style:parent-style-name="Standard">
      <style:paragraph-properties fo:line-height="200%" fo:text-align="justify" style:justify-single-word="false" fo:break-before="page" style:writing-mode="lr-tb" style:writing-mode-automatic="false"/>
      <style:text-properties style:font-name="Times New Roman" fo:language="es" fo:country="US" style:text-underline-style="none" fo:font-weight="normal" officeooo:rsid="003d68a4" officeooo:paragraph-rsid="003d68a4" style:font-weight-asian="normal" style:font-weight-complex="normal" style:script-type="latin"/>
    </style:style>
    <style:style style:name="T1" style:family="text">
      <style:text-properties fo:language="es" fo:country="US" style:script-type="latin"/>
    </style:style>
    <style:style style:name="T2" style:family="text">
      <style:text-properties fo:language="es" fo:country="US"/>
    </style:style>
    <style:style style:name="T3" style:family="text">
      <style:text-properties officeooo:rsid="001bc10e"/>
    </style:style>
    <style:style style:name="T4" style:family="text">
      <style:text-properties officeooo:rsid="001e5f62"/>
    </style:style>
    <style:style style:name="T5" style:family="text">
      <style:text-properties fo:language="en" fo:country="US"/>
    </style:style>
    <style:style style:name="T6" style:family="text">
      <style:text-properties officeooo:rsid="001f247c"/>
    </style:style>
    <style:style style:name="T7" style:family="text">
      <style:text-properties fo:font-weight="bold" officeooo:rsid="001f247c" style:font-weight-asian="bold" style:font-weight-complex="bold"/>
    </style:style>
    <style:style style:name="T8" style:family="text">
      <style:text-properties officeooo:rsid="0021471a"/>
    </style:style>
    <style:style style:name="T9" style:family="text">
      <style:text-properties officeooo:rsid="00225847"/>
    </style:style>
    <style:style style:name="T10" style:family="text">
      <style:text-properties fo:language="en" fo:country="US" officeooo:rsid="00225847"/>
    </style:style>
    <style:style style:name="T11" style:family="text">
      <style:text-properties fo:language="es" fo:country="US" style:text-underline-style="none" officeooo:rsid="001e5f62" style:font-weight-asian="normal" style:font-weight-complex="normal" style:script-type="latin"/>
    </style:style>
    <style:style style:name="T12" style:family="text">
      <style:text-properties fo:language="es" fo:country="US" style:text-underline-style="none" officeooo:rsid="00211421" style:font-weight-asian="normal" style:font-weight-complex="normal" style:script-type="latin"/>
    </style:style>
    <style:style style:name="T13" style:family="text">
      <style:text-properties fo:language="es" fo:country="US" style:text-underline-style="none" officeooo:rsid="00225847" style:font-weight-asian="normal" style:font-weight-complex="normal" style:script-type="latin"/>
    </style:style>
    <style:style style:name="T14" style:family="text">
      <style:text-properties fo:font-weight="normal" style:font-weight-asian="normal" style:font-weight-complex="normal"/>
    </style:style>
    <style:style style:name="T15" style:family="text">
      <style:text-properties officeooo:rsid="002487b6"/>
    </style:style>
    <style:style style:name="T16" style:family="text">
      <style:text-properties officeooo:rsid="00325022"/>
    </style:style>
    <style:style style:name="T17" style:family="text">
      <style:text-properties fo:language="en" fo:country="US" officeooo:rsid="0024fc3e"/>
    </style:style>
    <style:style style:name="T18" style:family="text">
      <style:text-properties officeooo:rsid="0024fc3e"/>
    </style:style>
    <style:style style:name="T19" style:family="text">
      <style:text-properties officeooo:rsid="00282558"/>
    </style:style>
    <style:style style:name="T20" style:family="text">
      <style:text-properties officeooo:rsid="002d2f12"/>
    </style:style>
    <style:style style:name="T21" style:family="text">
      <style:text-properties fo:language="en" fo:country="US" officeooo:rsid="002d2f12"/>
    </style:style>
    <style:style style:name="T22" style:family="text">
      <style:text-properties officeooo:rsid="002e350e"/>
    </style:style>
    <style:style style:name="T23" style:family="text">
      <style:text-properties officeooo:rsid="003c3e94"/>
    </style:style>
    <style:style style:name="T24" style:family="text">
      <style:text-properties officeooo:rsid="002ef886"/>
    </style:style>
    <style:style style:name="T25" style:family="text">
      <style:text-properties officeooo:rsid="002f0a33"/>
    </style:style>
    <style:style style:name="T26" style:family="text">
      <style:text-properties officeooo:rsid="002f50b0"/>
    </style:style>
    <style:style style:name="T27" style:family="text">
      <style:text-properties officeooo:rsid="002f77be"/>
    </style:style>
    <style:style style:name="T28" style:family="text">
      <style:text-properties officeooo:rsid="0030ea28"/>
    </style:style>
    <style:style style:name="T29" style:family="text">
      <style:text-properties officeooo:rsid="003365b6"/>
    </style:style>
    <style:style style:name="T30" style:family="text">
      <style:text-properties fo:font-weight="normal" officeooo:rsid="00345577" style:font-weight-asian="normal" style:font-weight-complex="normal"/>
    </style:style>
    <style:style style:name="T31" style:family="text">
      <style:text-properties fo:font-weight="normal" officeooo:rsid="00361799" style:font-weight-asian="normal" style:font-weight-complex="normal"/>
    </style:style>
    <style:style style:name="T32" style:family="text">
      <style:text-properties officeooo:rsid="00368fd8"/>
    </style:style>
    <style:style style:name="T33" style:family="text">
      <style:text-properties officeooo:rsid="00385509"/>
    </style:style>
    <style:style style:name="T34" style:family="text">
      <style:text-properties fo:font-weight="bold" style:font-weight-asian="bold" style:font-weight-complex="bold"/>
    </style:style>
    <style:style style:name="T35" style:family="text">
      <style:text-properties officeooo:rsid="003d68a4"/>
    </style:style>
    <style:style style:name="T36" style:family="text">
      <style:text-properties officeooo:rsid="003a04c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Universidad</text:span> <text:span text:style-name="T2">Tecnológica</text:span> <text:span text:style-name="T1">Nacional</text:span></text:p>
      <text:p text:style-name="P2">Tecnicatura Universitaria en Programación a Distancia</text:p>
      <text:p text:style-name="P1"><text:span text:style-name="T2">Programación</text:span> 1</text:p>
      <text:p text:style-name="P3">Gestión de datos de Países en Python: filtros, ordenamientos, y estadísticas</text:p>
      <text:p text:style-name="P1">Koenig Juan</text:p>
      <text:p text:style-name="P1">19 / 07 / 2026</text:p>
      <text:p text:style-name="P2"><draw:frame draw:style-name="fr1" draw:name="Imagen16" text:anchor-type="char" svg:width="13.697cm" svg:height="5.969cm" draw:z-index="15"><draw:image xlink:href="Pictures/10000001000002870000011AB172AF10.png" xlink:type="simple" xlink:show="embed" xlink:actuate="onLoad" draw:mime-type="image/png"/></draw:frame></text:p>
      <text:p text:style-name="P4">Indice</text:p>
      <text:p text:style-name="P5">Introducción…………………………………….3</text:p>
      <text:p text:style-name="P5">Objetivos.……………………………………….4</text:p>
      <text:p text:style-name="P5">Marco Teórico…………………………………...5</text:p>
      <text:p text:style-name="P5"><text:tab/>Listas…………………………………….6</text:p>
      <text:p text:style-name="P5"><text:tab/>Diccionarios……………………………..7</text:p>
      <text:p text:style-name="P5"><text:tab/>Condicionales…………………………...8</text:p>
      <text:p text:style-name="P5"><text:tab/>Ordenamientos..………………………..10</text:p>
      <text:p text:style-name="P5"><text:tab/>Estadísticas Básicas…...………………..13</text:p>
      <text:p text:style-name="P5"><text:tab/>Archivos CSV…………………………..14</text:p>
      <text:p text:style-name="P5">Diagrama de Flujo……………………………...17</text:p>
      <text:p text:style-name="P6">Desarrollo de Funciones………………………..18</text:p>
      <text:p text:style-name="P6"><text:tab/>Ver Datos………………………………..18</text:p>
      <text:p text:style-name="P6"><text:tab/>Agregar País…………………………….19</text:p>
      <text:p text:style-name="P6"><text:tab/>Actualizar Datos………………………....21</text:p>
      <text:p text:style-name="P6"><text:tab/>Buscar……………………………………22</text:p>
      <text:p text:style-name="P6"><text:tab/>Estadísticas………………………………22</text:p>
      <text:p text:style-name="P6"><text:tab/>Ordenar…………………………………..24</text:p>
      <text:p text:style-name="P6"><text:tab/>Salir……………………………………...26</text:p>
      <text:p text:style-name="P7">Introducción</text:p>
      <text:p text:style-name="P8">Este es el trabajo practico integrador de la materia programación 1 de la Universidad Tecnológica Nacional de Argentina, en el cual se tuvo que desarrollar un programa con Python con el objetivo de manejar archivos csv y demostrar los conocimientos de las funciones básicas de python. Este programa tiene opciones de filtro, búsqueda parcial, ordenamientos, agregar, y editar países en una lista de países con datos de población, superficie y continente</text:p>
      <text:p text:style-name="P8">en este documento se van a encontrar los problemas que surgieron en el desarrollo del código y como se trabajo sobre tales problemas, las ideas y los porqués de algunas decisiones</text:p>
      <text:p text:style-name="P8"/>
      <text:p text:style-name="P9">Objetivos</text:p>
      <text:p text:style-name="P10">estos son los objetivos tal cual están escritos en la consigna del TPI;</text:p>
      <text:p text:style-name="P10"/>
      <text:p text:style-name="P10">Desarrollar una aplicación en Python que permita gestionar información sobre países, aplicando listas, diccionarios, funciones, estructuras condicionales y repetitivas, ordenamientos y estadísticas. El sistema debe ser capaz de leer datos desde un archivo CSV, realizar consultas y generar indicadores clave a partir del dataset. El objetivo principal es afianzar el uso de estructuras de datos, modularización con funciones y técnicas de filtrado/ordenamiento, aplicando los conceptos aprendidos en Programación 1.</text:p>
      <text:p text:style-name="P10"/>
      <text:p text:style-name="P10">entonces los objetivos claros son:</text:p>
      <text:list text:style-name="L1">
        <text:list-item>
          <text:p text:style-name="P11">Desarrollar una aplicación en Python para gestionar información sobre países</text:p>
        </text:list-item>
        <text:list-item>
          <text:p text:style-name="P11">Aplicar estructuras de datos como listas y diccionarios</text:p>
        </text:list-item>
        <text:list-item>
          <text:p text:style-name="P11">Implementar funciones modulares con una responsabilidad cada una</text:p>
        </text:list-item>
        <text:list-item>
          <text:p text:style-name="P11">Leer y escribir datos desde archivos CSV</text:p>
        </text:list-item>
        <text:list-item>
          <text:p text:style-name="P11">Aplicar técnicas de filtrado, ordenamiento, y estadísticas</text:p>
        </text:list-item>
        <text:list-item>
          <text:p text:style-name="P11">Validar entradas del usuario y manejar errores básicos</text:p>
        </text:list-item>
      </text:list>
      <text:p text:style-name="P12">Marco Teórico</text:p>
      <text:p text:style-name="P13">Quiero explicar al lector los siguiente conceptos de programación y a continuación mostrar como fueron usados en el código:</text:p>
      <text:list text:style-name="L2">
        <text:list-item>
          <text:p text:style-name="P14">Listas</text:p>
        </text:list-item>
        <text:list-item>
          <text:p text:style-name="P14">Diccionarios</text:p>
        </text:list-item>
        <text:list-item>
          <text:p text:style-name="P14">Funciones</text:p>
        </text:list-item>
        <text:list-item>
          <text:p text:style-name="P14">Condicionales</text:p>
        </text:list-item>
        <text:list-item>
          <text:p text:style-name="P14">Ordenamientos</text:p>
        </text:list-item>
        <text:list-item>
          <text:p text:style-name="P14">Estad<text:span text:style-name="T3">í</text:span>sticas B<text:span text:style-name="T3">á</text:span>sicas</text:p>
        </text:list-item>
        <text:list-item>
          <text:p text:style-name="P14">Archivos CSV</text:p>
        </text:list-item>
      </text:list>
      <text:p text:style-name="P15"/>
      <text:p text:style-name="P15"/>
      <text:p text:style-name="P16">Listas</text:p>
      <text:p text:style-name="P17">Antes de definir lo que es una lista es una necesidad explicar que es una variable y como se declara. Las variables en python se declaran escribiendo el nombre que queramos otorgarle, el signo igual ( = ) y el valor de esa variable, por ej;</text:p>
      <text:p text:style-name="P18">año = 2026</text:p>
      <text:p text:style-name="P19">esto genera la variable “año” cuyo valor es un numero entero 2026, pero una variable ademas de n<text:span text:style-name="T4">ú</text:span>meros enteros, tambi<text:span text:style-name="T4">é</text:span>n pueden almacenar otro tipos de datos: Strings (cadenas de texto), valores booleanos (True o False), n<text:span text:style-name="T4">ú</text:span>meros enteros y decimales. Ademas de estos tipos de datos pueden alm<text:span text:style-name="T4">a</text:span>cenar datos mas complejos como diccionarios y listas.</text:p>
      <text:p text:style-name="P19">Las listas se declaran igual que una variable como la del ejemplo pero después de “ = “ se usan llaves [] y dentro de las llaves se pueden guardar mas de un dato e incluso se pueden guardar varios tipos de datos diferentes <text:span text:style-name="T4">por ej:</text:span></text:p>
      <text:p text:style-name="P20">estudiante = <text:span text:style-name="T5">[“</text:span>Marcos<text:span text:style-name="T5">”, </text:span>21, True<text:span text:style-name="T5">]</text:span></text:p>
      <text:p text:style-name="P20">Este ejemplo es una lista con 3 datos y 3 tipos de datos diferentes: un string, un entero (int), y un booleano</text:p>
      <text:p text:style-name="P20">en el código de este programa, una de las primeras lineas tiene la tarea de crear una lista vacía por el momento con el nombre paises, en esta lista se van a guardar los datos con los que se van a trabajar, los datos son agregados en forma de diccionarios, <text:span text:style-name="T6">a continuación explicamos este tipo de dato</text:span></text:p>
      <text:p text:style-name="P20"/>
      <text:p text:style-name="P21"/>
      <text:p text:style-name="P22"><text:span text:style-name="T7">Diccionarios</text:span></text:p>
      <text:p text:style-name="P23">Un diccionario es similar a una lista con respecto a que no guarda un solo valor, sino un conjunto de valores similares a variables, mencionamos como una variable tiene un nombre y un valor, en un diccionario se guarda valores que se dividen en dos: key y values.</text:p>
      <text:p text:style-name="P23"/>
      <text:p text:style-name="P24">Se puede pensar en el key como el nombre de una variable y el value en el valor de la misma, vamos a convertir el ejemplo anterior en un diccionario para que se vea la diferencia</text:p>
      <text:p text:style-name="P24">estudiante = {“nombre”: “Marcos”, “edad”: 2<text:span text:style-name="T8">1</text:span>, “aprobado”: True}</text:p>
      <text:p text:style-name="P25">En este ejemplo, nombre, edad, y aprobado son los keys, y los values corresponden a Marcos, 21, y True</text:p>
      <text:p text:style-name="P22"><text:tab/><text:span text:style-name="T9">En el código de nuestro programa se usa una lista para guardar los datos de los países como se mencionó antes, esta lista guarda un diccionario por cada país, es decir la lista mencionada antes paises = </text:span><text:span text:style-name="T10">[] </text:span><text:span text:style-name="T9">es una lista de diccionarios. Cada diccionario tiene el siguiente formato:</text:span></text:p>
      <text:p text:style-name="P26"><text:span text:style-name="T11"><text:tab/></text:span><text:span text:style-name="T12">{“nombre”: “</text:span><text:span text:style-name="T13">Argentina</text:span><text:span text:style-name="T12">”, “</text:span><text:span text:style-name="T13">poblacion</text:span><text:span text:style-name="T12">”: </text:span><text:span text:style-name="T13">45376763</text:span><text:span text:style-name="T12"> , “</text:span><text:span text:style-name="T13">superficie</text:span><text:span text:style-name="T12">”: </text:span><text:span text:style-name="T13">2780400, “continente: América”</text:span><text:span text:style-name="T12">}</text:span></text:p>
      <text:p text:style-name="P27"/>
      <text:p text:style-name="P27"/>
      <text:p text:style-name="P28">Funciones</text:p>
      <text:p text:style-name="P28"><text:span text:style-name="T14">si vemos las ultimas lineas del código se ve un comentario #ARMAR PROGRAMA y debajo una función con el nombre programa_principal() donde se evalúa el valor de una variable y </text:span><text:soft-page-break/><text:span text:style-name="T14">según su valor se ejecuta una función, mas adelante se vera cada función del programa en detalle, ahora vamos a ver que es una función y que rol cumple en nuestro código.</text:span></text:p>
      <text:p text:style-name="P29"/>
      <text:p text:style-name="P29"><text:tab/>Para declarar una función primero se escribe “def” y se le asigna el nombre como cuando creamos una variable, seguido del nombre se abren paréntesis y dentro se colocan los parámetros con los que la función trabajará y después de cerrar los paréntesis se usa “ : ” y en una nueva linea i<text:span text:style-name="T15">n</text:span>dentada se escribe lo que queremos que la funci<text:span text:style-name="T15">ó</text:span>n haga. A continuaci<text:span text:style-name="T15">ó</text:span>n un ejemplo de una funci<text:span text:style-name="T15">ó</text:span>n que suma 2 n<text:span text:style-name="T15">ú</text:span>meros</text:p>
      <text:p text:style-name="P29"/>
      <text:p text:style-name="P29"><text:tab/>def sumar(a, b):</text:p>
      <text:p text:style-name="P29"><text:tab/><text:tab/>return a + b</text:p>
      <text:p text:style-name="P29"><text:tab/><text:span text:style-name="T15">la palabra return le indica a la función que tiene que mostrar al resto del código, sin eso, todo lo que pase dentro de la función queda dentro de la función. Este código está organizado en bloques de funciones, lo único que no pertenece a una función es la importación de la librería CSV, la lista “pa</text:span><text:span text:style-name="T16">í</text:span><text:span text:style-name="T15">ses” y un algoritmo que carga datos desde un archivo csv a la lista paises.</text:span></text:p>
      <text:p text:style-name="P29"/>
      <text:p text:style-name="P30">Condicionales</text:p>
      <text:p text:style-name="P31">la función ya mencionada “programa_principal()” es un condicional. Esto es, una estructura de código típica en varios lenguajes de programación, donde se recibe una variable y se hacen comparaciones para decidir que acción tomar</text:p>
      <text:p text:style-name="P32"/>
      <text:p text:style-name="P31"><text:tab/><text:span text:style-name="T17">def es</text:span><text:span text:style-name="T18">_par(numero):</text:span></text:p>
      <text:p text:style-name="P31"><text:soft-page-break/><text:tab/><text:tab/><text:span text:style-name="T18">if numero % 2 == 0:</text:span></text:p>
      <text:p text:style-name="P31"><text:tab/><text:tab/><text:tab/><text:span text:style-name="T18">print(“el numero es par”)</text:span></text:p>
      <text:p text:style-name="P31"><text:tab/><text:tab/><text:span text:style-name="T18">else:</text:span></text:p>
      <text:p text:style-name="P31"><text:tab/><text:tab/><text:tab/><text:span text:style-name="T18">print(“el numero es impar”)</text:span></text:p>
      <text:p text:style-name="P31"/>
      <text:p text:style-name="P31"><text:span text:style-name="T18">es_par(4) va a mostrar en la consola: el numero es par</text:span></text:p>
      <text:p text:style-name="P33"><text:span text:style-name="T18">es_par(5) va a mostrar en la consola: el numero es impar</text:span></text:p>
      <text:p text:style-name="P34"><text:tab/>la estructura if-else en este caso usa la variable numero para verificar que c<text:span text:style-name="T19">ó</text:span>digo ejecutar, si se cumple la primera condici<text:span text:style-name="T19">ó</text:span>n, se ejecuta el c<text:span text:style-name="T19">ó</text:span>digo dentro del bloque if, de lo contrario se ejecuta el bloque else, es posible verificar mas caracter<text:span text:style-name="T19">í</text:span>sticas de las variables usando la sentencia elif y si ninguna se cumple se ejecutara else como ultimo recurso.</text:p>
      <text:p text:style-name="P34"/>
      <text:p text:style-name="P34"><text:tab/>En el código hay muchos mas ifs, el mas útil si se puede elegir uno, es el utilizado para navegar por un menú principal y también por otros sub menús, también cuando el usuario quiere agregar un nuevo país al archivo, deberá agregar nombre, población, superficie, y también continente. Pero para el continente la estructura usada es un if donde se verifica si una variable esta entre los números del 1 al 5 (si es 6 se ejecuta el else), cada uno correspondiente a un continente</text:p>
      <text:p text:style-name="P34"/>
      <text:p text:style-name="P34"/>
      <text:p text:style-name="P35"/>
      <text:p text:style-name="P35"/>
      <text:p text:style-name="P36"><text:soft-page-break/>Ordenamientos</text:p>
      <text:p text:style-name="P37">una de las funciones que hay en el programa consiste en mostrar los datos y si el usuario quiere, puede ver estos datos de manera ordenada, los datos pueden ser ordenados alfabéticamente o por numero de menor a mayor y viceversa con respecto a la población y superficie</text:p>
      <text:p text:style-name="P37"/>
      <text:p text:style-name="P37"><text:tab/><text:span text:style-name="T20">una forma de ordenar elementos en una lista es:</text:span></text:p>
      <text:p text:style-name="P37"><text:span text:style-name="T20">ejemplo = </text:span><text:span text:style-name="T21">[“</text:span><text:span text:style-name="T20">a”, “c”, “b”, “d”</text:span><text:span text:style-name="T21">]</text:span></text:p>
      <text:p text:style-name="P38">ejemplo[1], <text:s/>ejemplo[2] = ejemplo[2], ejemplo[1]</text:p>
      <text:p text:style-name="P38"><text:tab/>si esto se imprime con print<text:span text:style-name="T22">(ejemplo)</text:span> va a mostrar la lista como [a, b, c, d]</text:p>
      <text:p text:style-name="P39">esto se uso para armar algoritmos de ordenamiento para mostrar los paises en orden de poblaci<text:span text:style-name="T23">ó</text:span>n o superficie según quiera el usuario, también una comparaci<text:span text:style-name="T24">ó</text:span>n con 2 ciclos for para comp<text:span text:style-name="T24">ar</text:span>ar todos los elementos de la lista con todos de la siguiente manera</text:p>
      <text:p text:style-name="P39"><text:tab/> <text:s text:c="7"/>for iteracion in range(len(paises)):</text:p>
      <text:p text:style-name="P39"><text:s text:c="20"/><text:tab/>for item in range(len(paises)):</text:p>
      <text:p text:style-name="P39"><text:s text:c="24"/><text:tab/>if paises[iteracion]["poblacion"] &lt; paises[item]["poblacion"]:</text:p>
      <text:p text:style-name="P39"><text:s text:c="28"/><text:tab/><text:tab/>paises[iteracion], paises[item] = paises[item], paises[iteracion]</text:p>
      <text:p text:style-name="P39"/>
      <text:p text:style-name="P40">si vemos la primera parte donde hay 2 bucles for y usamos un print podemos ver que pasa de forma mas clara y obvia:</text:p>
      <text:p text:style-name="P41"/>
      <text:p text:style-name="P42">ejemplo = ["a", "c", "b", "d"]</text:p>
      <text:p text:style-name="P42">for i in range(len(ejemplo)):</text:p>
      <text:p text:style-name="P42"><text:s text:c="4"/>for j in range(len(ejemplo)):</text:p>
      <text:p text:style-name="P42"><text:s text:c="8"/>print(ejemplo[i], ejemplo[j])</text:p>
      <text:p text:style-name="P42">esto nos mostraria en la consola a a, a b, a c, a d, b a, b b, etc</text:p>
      <text:p text:style-name="P42"/>
      <text:p text:style-name="P43"><draw:frame draw:style-name="fr2" draw:name="Imagen1" text:anchor-type="char" svg:width="16.51cm" svg:height="11.151cm" draw:z-index="0"><draw:image xlink:href="Pictures/10000001000003F9000002AFE9B0FA9F.png" xlink:type="simple" xlink:show="embed" xlink:actuate="onLoad" draw:mime-type="image/png"/></draw:frame><text:tab/>entonces cada elemento dentro de la lista se compar<text:span text:style-name="T23">a</text:span> con todos y se acomodan usando una comparación con if donde se ve cual de los 2 números es menor y de ser así se cambian de lugar dependiendo si el usuario los quiere ver de menor a mayor o de mayor a menor.</text:p>
      <text:p text:style-name="P40"/>
      <text:p text:style-name="P40"><text:tab/><text:span text:style-name="T25">Esta es la lógica que se usó para acomodar los pa</text:span><text:span text:style-name="T26">í</text:span><text:span text:style-name="T25">ses en el código, funciona exactamente igual cuando se ordena de manera alfabética ya </text:span><text:span text:style-name="T26">que cada letra tiene un valor ASCII asignado, las letras del la “a” a la “z” van desde el 97 al 122 y las mayúsculas del 65 al 90, </text:span><text:span text:style-name="T27">por esto al hacer el mismo algoritmo de ordenamiento, también funciona.</text:span></text:p>
      <text:p text:style-name="P44"><text:span text:style-name="T2">Estadísticas</text:span> b<text:span text:style-name="T2">ásicas</text:span></text:p>
      <text:p text:style-name="P45">en el menú, el usuario puedo usar la opción 5 para ver las estadísticas del archivo CSV, que estas son: país con mayor y menor población, mayor y menor superficie, sus respectivos promedios y la cantidad de países en cada continente que hay en el CSV, <text:span text:style-name="T16">toda la función que el usuario usa con un numero, consiste en 4 funciones: la primera calcula los mayores y menores con respecto a la población y sperficie, la segunda los promedios de ambos, la tercera cuantos países hay en cada continente, y la ultima ensambla todo esto en un print para que el usuario lo vea de manera formateada. Esta ultima usa las funciones anteriores, es decir, es una función que usa funciones</text:span></text:p>
      <text:p text:style-name="P45"/>
      <text:p text:style-name="P45"><text:tab/><text:span text:style-name="T28">para encontrar los pa</text:span><text:span text:style-name="T16">í</text:span><text:span text:style-name="T28">ses con los datos mas bajos se usa un bucle for donde se recorren todos los diccionarios en la lista de diccionarios (pa</text:span><text:span text:style-name="T16">í</text:span><text:span text:style-name="T28">ses), se toma el primer valor como el m</text:span><text:span text:style-name="T16">í</text:span><text:span text:style-name="T28">nimo y el m</text:span><text:span text:style-name="T16">á</text:span><text:span text:style-name="T28">ximo a la vez en variables previas al ciclo for y desde la primera iteración se comparan los indices de la lista con el supuesto valor m</text:span><text:span text:style-name="T16">í</text:span><text:span text:style-name="T28">nimo y m</text:span><text:span text:style-name="T16">á</text:span><text:span text:style-name="T28">ximo y cuando el valor a comparar es menor al actual m</text:span><text:span text:style-name="T16">í</text:span><text:span text:style-name="T28">nimo, se reemplaza el valor m</text:span><text:span text:style-name="T16">í</text:span><text:span text:style-name="T28">nimo con el indice comparado actual.</text:span></text:p>
      <text:p text:style-name="P45"/>
      <text:p text:style-name="P45"><text:span text:style-name="T16"><text:tab/>Para encontrar los promedios se usa un bucle for donde en cada iteración el numero de superficie y población de cada país se suma a 2 variables acumuladoras para tener el total, y se divide por la cantidad de países, es una operación de calcular el promedio básica</text:span></text:p>
      <text:p text:style-name="P45"/>
      <text:p text:style-name="P45"/>
      <text:p text:style-name="P45"><draw:frame draw:style-name="fr3" draw:name="Imagen2" text:anchor-type="char" svg:width="15.983cm" svg:height="6.414cm" draw:z-index="1"><draw:image xlink:href="Pictures/10000001000002F30000012F0ADA4936.png" xlink:type="simple" xlink:show="embed" xlink:actuate="onLoad" draw:mime-type="image/png"/></draw:frame><text:soft-page-break/><text:s/><text:span text:style-name="T16">el 2 al final de cada operación despu</text:span><text:span text:style-name="T29">é</text:span><text:span text:style-name="T16">s de la divisi</text:span><text:span text:style-name="T29">ó</text:span><text:span text:style-name="T16">n es para que </text:span><text:span text:style-name="T29">el resultado final se limite a 2 decimales para no mostrar números muy largos al usuario.</text:span></text:p>
      <text:p text:style-name="P45"/>
      <text:p text:style-name="P46">Archivos CSV</text:p>
      <text:p text:style-name="P47">CSV (comma separated values) son archivos de texto usados universalmente para transferir información de texto plano a formato tabla para excel. Tienen este formato:</text:p>
      <text:p text:style-name="P47"><text:span text:style-name="T5">nombre, poblac</text:span>ión, superficie, continente</text:p>
      <text:p text:style-name="P47">Argentina,45376763,2780400,América</text:p>
      <text:p text:style-name="P47">Brasil,213993437,8515767,América</text:p>
      <text:p text:style-name="P47">Chile,19116201,756102,América</text:p>
      <text:p text:style-name="P47"/>
      <text:p text:style-name="P47"><text:tab/>se pueden guardar en bloc de notas con la extensión .csv y son interpretados por Python con el modulo csv. (En la tercera linea del código se importa). El programa apenas comienza lee un archivo CSV y vuelca la información en la lista países</text:p>
      <text:p text:style-name="P48">esto es lo que tiene el archivo CSV que viene con el programa:</text:p>
      <text:p text:style-name="P47">nombre,poblacion,superficie,continente</text:p>
      <text:p text:style-name="P47">Argentina,45376763,2780400,América</text:p>
      <text:p text:style-name="P47">Brasil,213993437,8515767,América</text:p>
      <text:p text:style-name="P47">Chile,19116201,756102,América</text:p>
      <text:p text:style-name="P47">Colombia,51265844,1141748,América</text:p>
      <text:p text:style-name="P47">México,126705138,1964375,América</text:p>
      <text:p text:style-name="P47">Japón,125800000,377975,Asia</text:p>
      <text:p text:style-name="P47">China,1412600000,9596960,Asia</text:p>
      <text:p text:style-name="P47">India,1380004385,3287263,Asia</text:p>
      <text:p text:style-name="P47">Corea del Sur,51780579,100210,Asia</text:p>
      <text:p text:style-name="P47">Indonesia,273523621,1904569,Asia</text:p>
      <text:p text:style-name="P47">Alemania,83149300,357022,Europa</text:p>
      <text:p text:style-name="P47">Francia,67391582,551695,Europa</text:p>
      <text:p text:style-name="P47">España,47351567,505990,Europa</text:p>
      <text:p text:style-name="P47">Italia,60367477,301340,Europa</text:p>
      <text:p text:style-name="P47">Reino Unido,67886011,243610,Europa</text:p>
      <text:p text:style-name="P47">Nigeria,206139589,923768,África</text:p>
      <text:p text:style-name="P47">Etiopía,114963588,1104300,África</text:p>
      <text:p text:style-name="P47">Egipto,102334404,1001449,África</text:p>
      <text:p text:style-name="P47">Sudáfrica,59308690,1219090,África</text:p>
      <text:p text:style-name="P47">Kenya,53771296,580367,África</text:p>
      <text:p text:style-name="P47"><text:soft-page-break/>Australia,25499884,7692024,Oceanía</text:p>
      <text:p text:style-name="P47">Nueva Zelanda,5084300,270467,Oceanía</text:p>
      <text:p text:style-name="P47"/>
      <text:p text:style-name="P48"/>
      <text:p text:style-name="P49">Diagrama de Flujo</text:p>
      <text:p text:style-name="P49"/>
      <text:p text:style-name="P49"><draw:frame draw:style-name="fr3" draw:name="Imagen3" text:anchor-type="char" svg:width="12.786cm" svg:height="17.099cm" draw:z-index="2"><draw:image xlink:href="Pictures/10000001000002AA00000390835CF6B0.png" xlink:type="simple" xlink:show="embed" xlink:actuate="onLoad" draw:mime-type="image/png"/></draw:frame><text:s/></text:p>
      <text:p text:style-name="P49"><draw:frame draw:style-name="fr4" draw:name="Imagen4" text:anchor-type="char" svg:width="16.51cm" svg:height="5.098cm" draw:z-index="3"><draw:image xlink:href="Pictures/1000000100000340000001015461921F.png" xlink:type="simple" xlink:show="embed" xlink:actuate="onLoad" draw:mime-type="image/png"/></draw:frame><text:soft-page-break/><text:span text:style-name="T30">Esto es lo primero que ve el usuario la iniciar el programa, </text:span><text:span text:style-name="T31">un menú con 7 opciones que se eligen con los mismos números, las opciones del 1 al 6 al cumplir su función, vuelven al menú principal a excepción de la opción 7 que termina el programa</text:span></text:p>
      <text:p text:style-name="P50"/>
      <text:p text:style-name="P51">1. Ver Datos</text:p>
      <text:p text:style-name="P52"><text:span text:style-name="T32">es una función cuya tarea es mostrar al usuario la lista de diccionarios de manera formateada, al principio mostraba los diccionarios crudos con llaves y los valores separados por comas pero fue arreglado con varios prints para que se muestren de manera mas prolija al usuario</text:span></text:p>
      <text:p text:style-name="P53"><text:s text:c="4"/>for item in paises:</text:p>
      <text:p text:style-name="P53"><text:s text:c="8"/>print(</text:p>
      <text:p text:style-name="P53"><text:s text:c="12"/>f"Nombre: {item["nombre"]}\n"</text:p>
      <text:p text:style-name="P53"><text:s text:c="12"/>f"Poblacion: {item["poblacion"]} hab.\n"</text:p>
      <text:p text:style-name="P53"><text:s text:c="12"/>f"Superficie: {item["superficie"]} Km2\n"</text:p>
      <text:p text:style-name="P53"><text:s text:c="12"/>f"Continente: {item["continente"]}\n"</text:p>
      <text:p text:style-name="P53"><text:s text:c="8"/>)</text:p>
      <text:p text:style-name="P53"/>
      <text:p text:style-name="P53"><draw:frame draw:style-name="fr5" draw:name="Imagen5" text:anchor-type="char" svg:x="2.096cm" svg:y="-0.106cm" svg:width="9.483cm" svg:height="6.604cm" draw:z-index="4"><draw:image xlink:href="Pictures/10000001000001C0000001386BDA7549.png" xlink:type="simple" xlink:show="embed" xlink:actuate="onLoad" draw:mime-type="image/png"/></draw:frame><text:soft-page-break/></text:p>
      <text:p text:style-name="P53"/>
      <text:p text:style-name="P53"/>
      <text:p text:style-name="P53"/>
      <text:p text:style-name="P53"/>
      <text:p text:style-name="P53"/>
      <text:p text:style-name="P53"/>
      <text:p text:style-name="P53"/>
      <text:p text:style-name="P53"/>
      <text:p text:style-name="P53">después de mostrar los datos el usuario puede usar un sub menú para filtrar los países por: continente, rango de población, y rango de superficie, <text:span text:style-name="T33">es decir, solo ver países de tales continentes o que encajen en el rango de población o superficie dada por el usuario</text:span></text:p>
      <text:p text:style-name="P54">2.<text:span text:style-name="T34">Agregar pais</text:span></text:p>
      <text:p text:style-name="P54">El programa regula errores constantemente para evitar que se rompa y que solo termine cuando el usuario desee salir del programa, por ejemplo en la opción 2 para agregar país el usuario no puede agregar países que ya estén en el archivo CSV ni poner nombres vacíos</text:p>
      <text:p text:style-name="P54"/>
      <text:p text:style-name="P54"><draw:frame draw:style-name="fr1" draw:name="Imagen6" text:anchor-type="char" svg:width="11.367cm" svg:height="6.244cm" draw:z-index="5"><draw:image xlink:href="Pictures/100000010000021900000127C031F7D5.png" xlink:type="simple" xlink:show="embed" xlink:actuate="onLoad" draw:mime-type="image/png"/></draw:frame></text:p>
      <text:p text:style-name="P53"/>
      <text:p text:style-name="P53"/>
      <text:p text:style-name="P53"/>
      <text:p text:style-name="P53"/>
      <text:p text:style-name="P54"><text:soft-page-break/>al querer agregar un país, el usuario tiene que proveer: nombre, número de población, número de superficie, y continente</text:p>
      <text:p text:style-name="P54"/>
      <text:p text:style-name="P54">para manejar los posibles errores, el usuario no puede poner letras ni números negativos en las poblaciones y superficies (pero puede usar 0). En cuanto al continente es mejor limitar las opciones del usuario mostrando solo los 7 continentes disponibles para evitar también errores</text:p>
      <text:p text:style-name="P53"/>
      <text:p text:style-name="P53"><draw:frame draw:style-name="fr1" draw:name="Imagen7" text:anchor-type="char" svg:width="11.578cm" svg:height="8.827cm" draw:z-index="6"><draw:image xlink:href="Pictures/1000000100000223000001A1FCEFB2EE.png" xlink:type="simple" xlink:show="embed" xlink:actuate="onLoad" draw:mime-type="image/png"/></draw:frame></text:p>
      <text:p text:style-name="P55">Esto también soluciono el problema de las tildes que fueron un problema constante en todo el programa, ya que no todos los usan por conveniencia, y no seria raro ver en el archivo CSV mas de 7 continentes donde estén “América” y “America”, “África” y “Africa” y “Oceanía” y “Oceania”. Los nombres de los continentes son usados en otras partes del programa, entonces es importante que se haya solucionado esto.</text:p>
      <text:p text:style-name="P56"/>
      <text:p text:style-name="P57">3. Actualizar Datos</text:p>
      <text:p text:style-name="P58">La función de actualizar datos es útil por ejemplo si al agregar un país, sin querer insertamos un valor equivocado y necesitamos corregirlo</text:p>
      <text:p text:style-name="P58"><draw:frame draw:style-name="fr1" draw:name="Imagen8" text:anchor-type="char" svg:width="7.239cm" svg:height="4.826cm" draw:z-index="7"><draw:image xlink:href="Pictures/1000000100000156000000E4F11F41A8.png" xlink:type="simple" xlink:show="embed" xlink:actuate="onLoad" draw:mime-type="image/png"/></draw:frame></text:p>
      <text:p text:style-name="P53"/>
      <text:p text:style-name="P53"/>
      <text:p text:style-name="P53"/>
      <text:p text:style-name="P53"/>
      <text:p text:style-name="P53"/>
      <text:p text:style-name="P53"><draw:frame draw:style-name="fr4" draw:name="Imagen9" text:anchor-type="char" svg:width="16.51cm" svg:height="4.755cm" draw:z-index="8"><draw:image xlink:href="Pictures/100000010000030D000000E1F1F1D2C7.png" xlink:type="simple" xlink:show="embed" xlink:actuate="onLoad" draw:mime-type="image/png"/></draw:frame></text:p>
      <text:p text:style-name="P58"><text:soft-page-break/>cuando se elije la opci<text:span text:style-name="T35">ó</text:span>n 3 se debe escribir el nombre del país que queramos editar y luego en un men<text:span text:style-name="T35">ú</text:span> seleccionar el dato que queramos corregir</text:p>
      <text:p text:style-name="P58"/>
      <text:p text:style-name="P59">4. Buscar</text:p>
      <text:p text:style-name="P58"><draw:frame draw:style-name="fr1" draw:name="Imagen10" text:anchor-type="char" svg:width="6.689cm" svg:height="3.535cm" draw:z-index="9"><draw:image xlink:href="Pictures/100000010000013C000000A7429E5EAA.png" xlink:type="simple" xlink:show="embed" xlink:actuate="onLoad" draw:mime-type="image/png"/></draw:frame></text:p>
      <text:p text:style-name="P53"/>
      <text:p text:style-name="P53"/>
      <text:p text:style-name="P53"/>
      <text:p text:style-name="P53"/>
      <text:p text:style-name="P58">La opción buscar también permite la búsqueda parcial, es decir no es necesario escribir el nombre completo, esto genero una preocupación por no saber que pod<text:span text:style-name="T36">í</text:span>a pasar si el usuario buscaba un pa<text:span text:style-name="T35">í</text:span>s en especial pero ese pa<text:span text:style-name="T35">í</text:span>s tenia misma parte del nombre que otros, como es el caso de Corea del Norte y Corea del Sur, también Uruguay, Paraguay. Pero se soluciono f<text:span text:style-name="T36">á</text:span>cil mostrando todas las coincidencias recorriendo todos los diccionarios <text:span text:style-name="T36">y comparando con</text:span></text:p>
      <text:p text:style-name="P58">if pais_buscado.lower() in pais["nombre"].lower()</text:p>
      <text:p text:style-name="P58"/>
      <text:p text:style-name="P60">5. Estadísticas</text:p>
      <text:p text:style-name="P61">Esta es la función mas compleja y a la vez la mas simple para el usuario, lo que el usuario no ve es como 4 funciones trabajan juntas para armar un print que muestre los datos de los países, una función que busca los datos menores y mayores de población y superficie, otra función que cuenta los países de cada continente, otra función que junta los promedios y la mas importante que es la que ensambla todos los datos y los muestra formateados</text:p>
      <text:p text:style-name="P62"><draw:frame draw:style-name="fr3" draw:name="Imagen11" text:anchor-type="char" svg:width="8.996cm" svg:height="14.139cm" draw:z-index="10"><draw:image xlink:href="Pictures/10000001000001A90000029C99EDA5A4.png" xlink:type="simple" xlink:show="embed" xlink:actuate="onLoad" draw:mime-type="image/png"/></draw:frame><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61">el mayor obstáculo que genero escribir este código es el no saber que cuando una función retorna varios resultados a la vez, se retorna como una tupla</text:p>
      <text:p text:style-name="P61"/>
      <text:p text:style-name="P63">6. Ordenar</text:p>
      <text:p text:style-name="P61">Esta función es sin duda la que mas tiempo y problemas causo debido a que se necesito armar un algoritmo de ordenamiento y puede ser confuso cuando lo que se quiere ordenar esta dentro de un diccionario dentro de una lista. La técnica que se usó para esto es “reducción de problema” consiste en llevar un problema complejo a uno mas básico para luego aplicar la solución básica al problema complejo.</text:p>
      <text:p text:style-name="P61"/>
      <text:p text:style-name="P64"><draw:frame draw:style-name="fr1" draw:name="Imagen12" text:anchor-type="char" svg:width="15.729cm" svg:height="6.985cm" draw:z-index="11"><draw:image xlink:href="Pictures/10000001000002E70000014AE980B2F0.png" xlink:type="simple" xlink:show="embed" xlink:actuate="onLoad" draw:mime-type="image/png"/></draw:frame>Antes de empezar a ordenar los diccionarios en la lista paises, se experimentó bastante en como armar un algoritmo que funcione usando bucles for y una lista con números del 0 al 9</text:p>
      <text:p text:style-name="P64"/>
      <text:p text:style-name="P64"><draw:frame draw:style-name="fr3" draw:name="Imagen13" text:anchor-type="char" svg:width="15.877cm" svg:height="10.075cm" draw:z-index="12"><draw:image xlink:href="Pictures/10000001000002EE000001DC34380570.png" xlink:type="simple" xlink:show="embed" xlink:actuate="onLoad" draw:mime-type="image/png"/></draw:frame><text:soft-page-break/>la misma solución fue llevada a un problema similar para luego ser aplicada al código principal</text:p>
      <text:p text:style-name="P64"><draw:frame draw:style-name="fr5" draw:name="Imagen14" text:anchor-type="char" svg:x="0.15cm" svg:y="1.94cm" svg:width="16.51cm" svg:height="9.592cm" draw:z-index="13"><draw:image xlink:href="Pictures/10000001000003F40000024C24838260.png" xlink:type="simple" xlink:show="embed" xlink:actuate="onLoad" draw:mime-type="image/png"/></draw:frame></text:p>
      <text:p text:style-name="P64"/>
      <text:p text:style-name="P65">7. Salir</text:p>
      <text:p text:style-name="P64">Esta última opción no es solo cerrar el programa, tambi<text:span text:style-name="T35">é</text:span>n se encarga de guardar todos los pa<text:span text:style-name="T35">í</text:span>ses agregados, guardar los datos actualizados, y ordenados como los haya querido el usuario usando el manejo de archivos de Python</text:p>
      <text:p text:style-name="P64"><draw:frame draw:style-name="fr4" draw:name="Imagen15" text:anchor-type="char" svg:width="16.51cm" svg:height="2.935cm" draw:z-index="14"><draw:image xlink:href="Pictures/1000000100000416000000BA5738439C.png" xlink:type="simple" xlink:show="embed" xlink:actuate="onLoad" draw:mime-type="image/png"/></draw:frame><text:span text:style-name="T35">vamos a ver cada linea de esta última función:</text:span></text:p>
      <text:p text:style-name="P64"/>
      <text:p text:style-name="P64">with open("paises.csv", "w", encoding="utf-8", newline="") as archivo:</text:p>
      <text:p text:style-name="P64"/>
      <text:p text:style-name="P66">abre el archivo CSV en modo escritura (w) así se sobreescribe todo el contendio previo, encoding=”utf-8” para usar los caracteres especiales y newline=() para que el módulo CSV maneje los saltos de linea</text:p>
      <text:p text:style-name="P66"/>
      <text:p text:style-name="P66">escritor = csv.DictWriter(archivo, fieldnames=["nombre", "poblacion", "superficie", "continente"])</text:p>
      <text:p text:style-name="P66"/>
      <text:p text:style-name="P66">Crea un escritor que sabe que cada fila es un diccionario con esas cuatro claves, y las va a escribir en ese orden</text:p>
      <text:p text:style-name="P66"/>
      <text:p text:style-name="P66"/>
      <text:p text:style-name="P67">escritor.writeheader()</text:p>
      <text:p text:style-name="P66"/>
      <text:p text:style-name="P66">Escribe la primera fila con los nombres de las columnas: nombre,poblacion,superficie,continente.</text:p>
      <text:p text:style-name="P66"/>
      <text:p text:style-name="P66">escritor.writerows(paises)</text:p>
      <text:p text:style-name="P66">Escribe todos los diccionarios de la lista paises como filas en el archiv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right" style:justify-single-word="false"/>
    </style:style>
    <style:page-layout style:name="Mpm1" style:page-usage="mirrored">
      <style:page-layout-properties fo:page-width="21.59cm" fo:page-height="27.94cm" style:num-format="1" style:print-orientation="portrait" fo:margin-top="2.54cm" fo:margin-bottom="2.54cm" fo:margin-left="2.54cm" fo:margin-right="2.54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text:bookmark-start text:name="PageNumWizard_HEADER_Estilo de página predeterminado1"/><text:page-number text:select-page="current">27</text:page-number><text:bookmark-end text:name="PageNumWizard_HEADER_Estilo de página predeterminado1"/></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7-18T14:42:06.083168900</meta:creation-date>
    <dc:date>2026-07-23T04:35:25.226361600</dc:date>
    <meta:editing-duration>PT48M11S</meta:editing-duration>
    <meta:editing-cycles>9</meta:editing-cycles>
    <meta:generator>LibreOffice/26.2.4.2$Windows_X86_64 LibreOffice_project/0229ac93fcf0d7cbc6376066c6f35021cef002dc</meta:generator>
    <meta:document-statistic meta:table-count="0" meta:image-count="16" meta:object-count="0" meta:page-count="27" meta:paragraph-count="177" meta:word-count="2761" meta:character-count="17373" meta:non-whitespace-character-count="14593"/>
  </office:meta>
</office:document-meta>
</file>